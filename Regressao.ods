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8.801cm" svg:y="0.531cm">
            <draw:object draw:notify-on-update-of-ranges="Sheet1.A1:Sheet1.A1 Sheet1.A2:Sheet1.A13 Sheet1.B1:Sheet1.B1 Sheet1.B2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9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19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number-columns-repeated="19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75" calcext:value-type="float">
            <text:p>0,75</text:p>
          </table:table-cell>
          <table:table-cell table:number-columns-repeated="19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19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table:number-columns-repeated="19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88" calcext:value-type="float">
            <text:p>0,88</text:p>
          </table:table-cell>
          <table:table-cell table:number-columns-repeated="19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19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92" calcext:value-type="float">
            <text:p>0,92</text:p>
          </table:table-cell>
          <table:table-cell table:number-columns-repeated="12"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table:number-columns-repeated="12"/>
          <table:table-cell office:value-type="string" calcext:value-type="string">
            <text:p>Regression Model</text:p>
          </table:table-cell>
          <table:table-cell office:value-type="string" calcext:value-type="string">
            <text:p>Logarithmic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table:number-columns-repeated="19"/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table:number-columns-repeated="12"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table:number-columns-repeated="14"/>
          <table:table-cell table:number-matrix-columns-spanned="2" table:number-matrix-rows-spanned="5" table:formula="of:=LINEST([.$B$28:.$B$39] ; LN([.$A$28:.$A$39]) ; 1 ; 1)" office:value-type="float" office:value="0.663050176485098" calcext:value-type="float">
            <text:p>0,663050176485098</text:p>
          </table:table-cell>
          <table:table-cell office:value-type="float" office:value="0.550738058004923" calcext:value-type="float">
            <text:p>0,550738058004923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float" office:value="0.0347962940879337" calcext:value-type="float">
            <text:p>0,0347962940879337</text:p>
          </table:table-cell>
          <table:table-cell office:value-type="float" office:value="0.0160542592926473" calcext:value-type="float">
            <text:p>0,0160542592926473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float" office:value="0.973197567545182" calcext:value-type="float">
            <text:p>0,973197567545182</text:p>
          </table:table-cell>
          <table:table-cell office:value-type="float" office:value="0.0266754989890544" calcext:value-type="float">
            <text:p>0,0266754989890544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float" office:value="363.100464551393" calcext:value-type="float">
            <text:p>363,10046455139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float" office:value="0.258375844203516" calcext:value-type="float">
            <text:p>0,258375844203516</text:p>
          </table:table-cell>
          <table:table-cell office:value-type="float" office:value="0.00711582246315044" calcext:value-type="float">
            <text:p>0,00711582246315044</text:p>
          </table:table-cell>
          <table:table-cell table:number-columns-repeated="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4"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R^2</text:p>
          </table:table-cell>
          <table:table-cell table:formula="of:=[.$O$16]" office:value-type="float" office:value="0.973197567545182" calcext:value-type="float">
            <text:p>0,973197567545182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Standard Error</text:p>
          </table:table-cell>
          <table:table-cell table:formula="of:=[.$P$16]" office:value-type="float" office:value="0.0266754989890544" calcext:value-type="float">
            <text:p>0,0266754989890544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Observations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Adjusted R^2</text:p>
          </table:table-cell>
          <table:table-cell table:formula="of:=1 - (1 - [.$O$16])*([.$P$24] - 1)/([.$P$24] - [.$P$23] - 1)" office:value-type="float" office:value="0.9705173242997" calcext:value-type="float">
            <text:p>0,9705173242997</text:p>
          </table:table-cell>
          <table:table-cell table:number-columns-repeated="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4"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table:formula="of:=[.A2] + 1" office:value-type="float" office:value="1" calcext:value-type="float">
            <text:p>1</text:p>
          </table:table-cell>
          <table:table-cell table:formula="of:=[.B2]" office:value-type="float" office:value="0.5" calcext:value-type="float">
            <text:p>0,5</text:p>
          </table:table-cell>
          <table:table-cell table:number-columns-repeated="2"/>
          <table:table-cell table:formula="of:=[.$A2] + 1" office:value-type="float" office:value="1" calcext:value-type="float">
            <text:p>1</text:p>
          </table:table-cell>
          <table:table-cell table:formula="of:=LN([.$E28]) * [.$P$37] + [.$P$36]" office:value-type="float" office:value="0.550738058004923" calcext:value-type="float">
            <text:p>0,550738058004923</text:p>
          </table:table-cell>
          <table:table-cell table:number-columns-repeated="9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table:formula="of:=[.A3] + 1" office:value-type="float" office:value="1.1" calcext:value-type="float">
            <text:p>1,1</text:p>
          </table:table-cell>
          <table:table-cell table:formula="of:=[.B3]" office:value-type="float" office:value="0.6" calcext:value-type="float">
            <text:p>0,6</text:p>
          </table:table-cell>
          <table:table-cell table:number-columns-repeated="2"/>
          <table:table-cell table:formula="of:=[.$A3] + 1" office:value-type="float" office:value="1.1" calcext:value-type="float">
            <text:p>1,1</text:p>
          </table:table-cell>
          <table:table-cell table:formula="of:=LN([.$E29]) * [.$P$37] + [.$P$36]" office:value-type="float" office:value="0.613933489545007" calcext:value-type="float">
            <text:p>0,613933489545007</text:p>
          </table:table-cell>
          <table:table-cell table:number-columns-repeated="8"/>
          <table:table-cell office:value-type="string" calcext:value-type="string">
            <text:p>Regression</text:p>
          </table:table-cell>
          <table:table-cell table:formula="of:=[.$P$23]" office:value-type="float" office:value="1" calcext:value-type="float">
            <text:p>1</text:p>
          </table:table-cell>
          <table:table-cell table:formula="of:=[.$O$18]" office:value-type="float" office:value="0.258375844203516" calcext:value-type="float">
            <text:p>0,258375844203516</text:p>
          </table:table-cell>
          <table:table-cell table:formula="of:=[.$O$18] / [.$P$29]" office:value-type="float" office:value="0.258375844203516" calcext:value-type="float">
            <text:p>0,258375844203516</text:p>
          </table:table-cell>
          <table:table-cell table:formula="of:=[.$O$17]" office:value-type="float" office:value="363.100464551393" calcext:value-type="float">
            <text:p>363,100464551393</text:p>
          </table:table-cell>
          <table:table-cell table:formula="of:=LEGACY.FDIST([.$O$17] ; [.$P$29] ; [.$P$17])" office:value-type="float" office:value="0.00000000344254083690131" calcext:value-type="float">
            <text:p>3,44254083690131E-09</text:p>
          </table:table-cell>
          <table:table-cell/>
        </table:table-row>
        <table:table-row table:style-name="ro1">
          <table:table-cell table:formula="of:=[.A4] + 1" office:value-type="float" office:value="1.2" calcext:value-type="float">
            <text:p>1,2</text:p>
          </table:table-cell>
          <table:table-cell table:formula="of:=[.B4]" office:value-type="float" office:value="0.7" calcext:value-type="float">
            <text:p>0,7</text:p>
          </table:table-cell>
          <table:table-cell table:number-columns-repeated="2"/>
          <table:table-cell table:formula="of:=[.$A4] + 1" office:value-type="float" office:value="1.2" calcext:value-type="float">
            <text:p>1,2</text:p>
          </table:table-cell>
          <table:table-cell table:formula="of:=LN([.$E30]) * [.$P$37] + [.$P$36]" office:value-type="float" office:value="0.671626398414193" calcext:value-type="float">
            <text:p>0,671626398414193</text:p>
          </table:table-cell>
          <table:table-cell table:number-columns-repeated="8"/>
          <table:table-cell office:value-type="string" calcext:value-type="string">
            <text:p>Residual</text:p>
          </table:table-cell>
          <table:table-cell table:formula="of:=[.$P$17]" office:value-type="float" office:value="10" calcext:value-type="float">
            <text:p>10</text:p>
          </table:table-cell>
          <table:table-cell table:formula="of:=[.$P$18]" office:value-type="float" office:value="0.00711582246315044" calcext:value-type="float">
            <text:p>0,00711582246315044</text:p>
          </table:table-cell>
          <table:table-cell table:formula="of:=[.$P$18] / [.$P$17]" office:value-type="float" office:value="0.000711582246315044" calcext:value-type="float">
            <text:p>0,000711582246315044</text:p>
          </table:table-cell>
          <table:table-cell table:number-columns-repeated="3"/>
        </table:table-row>
        <table:table-row table:style-name="ro1">
          <table:table-cell table:formula="of:=[.A5] + 1" office:value-type="float" office:value="1.3" calcext:value-type="float">
            <text:p>1,3</text:p>
          </table:table-cell>
          <table:table-cell table:formula="of:=[.B5]" office:value-type="float" office:value="0.75" calcext:value-type="float">
            <text:p>0,75</text:p>
          </table:table-cell>
          <table:table-cell table:number-columns-repeated="2"/>
          <table:table-cell table:formula="of:=[.$A5] + 1" office:value-type="float" office:value="1.3" calcext:value-type="float">
            <text:p>1,3</text:p>
          </table:table-cell>
          <table:table-cell table:formula="of:=LN([.$E31]) * [.$P$37] + [.$P$36]" office:value-type="float" office:value="0.724698729863476" calcext:value-type="float">
            <text:p>0,724698729863476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table:formula="of:=[.$P$29] + [.$P$17]" office:value-type="float" office:value="11" calcext:value-type="float">
            <text:p>11</text:p>
          </table:table-cell>
          <table:table-cell table:formula="of:=[.$O$18] + [.$P$18]" office:value-type="float" office:value="0.265491666666667" calcext:value-type="float">
            <text:p>0,265491666666667</text:p>
          </table:table-cell>
          <table:table-cell table:number-columns-repeated="4"/>
        </table:table-row>
        <table:table-row table:style-name="ro1">
          <table:table-cell table:formula="of:=[.A6] + 1" office:value-type="float" office:value="1.4" calcext:value-type="float">
            <text:p>1,4</text:p>
          </table:table-cell>
          <table:table-cell table:formula="of:=[.B6]" office:value-type="float" office:value="0.8" calcext:value-type="float">
            <text:p>0,8</text:p>
          </table:table-cell>
          <table:table-cell table:number-columns-repeated="2"/>
          <table:table-cell table:formula="of:=[.$A6] + 1" office:value-type="float" office:value="1.4" calcext:value-type="float">
            <text:p>1,4</text:p>
          </table:table-cell>
          <table:table-cell table:formula="of:=LN([.$E32]) * [.$P$37] + [.$P$36]" office:value-type="float" office:value="0.773836033878954" calcext:value-type="float">
            <text:p>0,773836033878954</text:p>
          </table:table-cell>
          <table:table-cell table:number-columns-repeated="15"/>
        </table:table-row>
        <table:table-row table:style-name="ro1">
          <table:table-cell table:formula="of:=[.A7] + 1" office:value-type="float" office:value="1.5" calcext:value-type="float">
            <text:p>1,5</text:p>
          </table:table-cell>
          <table:table-cell table:formula="of:=[.B7]" office:value-type="float" office:value="0.85" calcext:value-type="float">
            <text:p>0,85</text:p>
          </table:table-cell>
          <table:table-cell table:number-columns-repeated="2"/>
          <table:table-cell table:formula="of:=[.$A7] + 1" office:value-type="float" office:value="1.5" calcext:value-type="float">
            <text:p>1,5</text:p>
          </table:table-cell>
          <table:table-cell table:formula="of:=LN([.$E33]) * [.$P$37] + [.$P$36]" office:value-type="float" office:value="0.819581769494591" calcext:value-type="float">
            <text:p>0,819581769494591</text:p>
          </table:table-cell>
          <table:table-cell table:number-columns-repeated="8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,95</text:p>
          </table:table-cell>
          <table:table-cell table:number-columns-repeated="5"/>
        </table:table-row>
        <table:table-row table:style-name="ro1">
          <table:table-cell table:formula="of:=[.A8] + 1" office:value-type="float" office:value="1.6" calcext:value-type="float">
            <text:p>1,6</text:p>
          </table:table-cell>
          <table:table-cell table:formula="of:=[.B8]" office:value-type="float" office:value="0.88" calcext:value-type="float">
            <text:p>0,88</text:p>
          </table:table-cell>
          <table:table-cell table:number-columns-repeated="2"/>
          <table:table-cell table:formula="of:=[.$A8] + 1" office:value-type="float" office:value="1.6" calcext:value-type="float">
            <text:p>1,6</text:p>
          </table:table-cell>
          <table:table-cell table:formula="of:=LN([.$E34]) * [.$P$37] + [.$P$36]" office:value-type="float" office:value="0.862374047324945" calcext:value-type="float">
            <text:p>0,862374047324945</text:p>
          </table:table-cell>
          <table:table-cell table:number-columns-repeated="15"/>
        </table:table-row>
        <table:table-row table:style-name="ro1">
          <table:table-cell table:formula="of:=[.A9] + 1" office:value-type="float" office:value="1.7" calcext:value-type="float">
            <text:p>1,7</text:p>
          </table:table-cell>
          <table:table-cell table:formula="of:=[.B9]" office:value-type="float" office:value="0.9" calcext:value-type="float">
            <text:p>0,9</text:p>
          </table:table-cell>
          <table:table-cell table:number-columns-repeated="2"/>
          <table:table-cell table:formula="of:=[.$A9] + 1" office:value-type="float" office:value="1.7" calcext:value-type="float">
            <text:p>1,7</text:p>
          </table:table-cell>
          <table:table-cell table:formula="of:=LN([.$E35]) * [.$P$37] + [.$P$36]" office:value-type="float" office:value="0.902571213519674" calcext:value-type="float">
            <text:p>0,902571213519674</text:p>
          </table:table-cell>
          <table:table-cell table:number-columns-repeated="9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P$33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P$33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formula="of:=[.A10] + 1" office:value-type="float" office:value="1.8" calcext:value-type="float">
            <text:p>1,8</text:p>
          </table:table-cell>
          <table:table-cell table:formula="of:=[.B10]" office:value-type="float" office:value="0.92" calcext:value-type="float">
            <text:p>0,92</text:p>
          </table:table-cell>
          <table:table-cell table:number-columns-repeated="2"/>
          <table:table-cell table:formula="of:=[.$A10] + 1" office:value-type="float" office:value="1.8" calcext:value-type="float">
            <text:p>1,8</text:p>
          </table:table-cell>
          <table:table-cell table:formula="of:=LN([.$E36]) * [.$P$37] + [.$P$36]" office:value-type="float" office:value="0.94047010990386" calcext:value-type="float">
            <text:p>0,94047010990386</text:p>
          </table:table-cell>
          <table:table-cell table:number-columns-repeated="8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O$14:.$P$14]; 1 ; ROW([.$P$37])+1 - ROW())" office:value-type="float" office:value="0.550738058004923" calcext:value-type="float">
            <text:p>0,550738058004923</text:p>
          </table:table-cell>
          <table:table-cell table:number-matrix-columns-spanned="1" table:number-matrix-rows-spanned="2" table:formula="of:=INDEX([.$O$15:.$P$15]; 1 ; ROW([.$Q$37])+1 - ROW())" office:value-type="float" office:value="0.0160542592926473" calcext:value-type="float">
            <text:p>0,0160542592926473</text:p>
          </table:table-cell>
          <table:table-cell table:number-matrix-columns-spanned="1" table:number-matrix-rows-spanned="2" table:formula="of:=[.$P$36:.$P$37] / [.$Q$36:.$Q$37]" office:value-type="float" office:value="34.3047940092232" calcext:value-type="float">
            <text:p>34,3047940092232</text:p>
          </table:table-cell>
          <table:table-cell table:number-matrix-columns-spanned="1" table:number-matrix-rows-spanned="2" table:formula="of:=LEGACY.TDIST(ABS([.$R$36:.$R$37]) ; [.$P$17] ; 2 )" office:value-type="float" office:value="0.0000000000104883858288716" calcext:value-type="float">
            <text:p>1,04883858288716E-11</text:p>
          </table:table-cell>
          <table:table-cell table:number-matrix-columns-spanned="1" table:number-matrix-rows-spanned="2" table:formula="of:=[.$P$36:.$P$37] - [.$Q$36:.$Q$37] * TINV(1 - [.$P$33] ; [.$P$17])" office:value-type="float" office:value="0.514966939135114" calcext:value-type="float">
            <text:p>0,514966939135114</text:p>
          </table:table-cell>
          <table:table-cell table:number-matrix-columns-spanned="1" table:number-matrix-rows-spanned="2" table:formula="of:=[.$P$36:.$P$37] + [.$Q$36:.$Q$37] * TINV(1 - [.$P$33] ; [.$P$17])" office:value-type="float" office:value="0.586509176874732" calcext:value-type="float">
            <text:p>0,586509176874732</text:p>
          </table:table-cell>
        </table:table-row>
        <table:table-row table:style-name="ro1">
          <table:table-cell table:formula="of:=[.A11] + 1" office:value-type="float" office:value="1.9" calcext:value-type="float">
            <text:p>1,9</text:p>
          </table:table-cell>
          <table:table-cell table:formula="of:=[.B11]" office:value-type="float" office:value="0.96" calcext:value-type="float">
            <text:p>0,96</text:p>
          </table:table-cell>
          <table:table-cell table:number-columns-repeated="2"/>
          <table:table-cell table:formula="of:=[.$A11] + 1" office:value-type="float" office:value="1.9" calcext:value-type="float">
            <text:p>1,9</text:p>
          </table:table-cell>
          <table:table-cell table:formula="of:=LN([.$E37]) * [.$P$37] + [.$P$36]" office:value-type="float" office:value="0.976319390509176" calcext:value-type="float">
            <text:p>0,976319390509176</text:p>
          </table:table-cell>
          <table:table-cell table:number-columns-repeated="8"/>
          <table:table-cell table:formula="of:=&quot;LN(X1)&quot;" office:value-type="string" office:string-value="LN(X1)" calcext:value-type="string">
            <text:p>LN(X1)</text:p>
          </table:table-cell>
          <table:table-cell office:value-type="float" office:value="0.663050176485098" calcext:value-type="float">
            <text:p>0,663050176485098</text:p>
          </table:table-cell>
          <table:table-cell office:value-type="float" office:value="0.0347962940879337" calcext:value-type="float">
            <text:p>0,0347962940879337</text:p>
          </table:table-cell>
          <table:table-cell office:value-type="float" office:value="19.0551952115793" calcext:value-type="float">
            <text:p>19,0551952115793</text:p>
          </table:table-cell>
          <table:table-cell office:value-type="float" office:value="0.00000000344254083690131" calcext:value-type="float">
            <text:p>3,44254083690131E-09</text:p>
          </table:table-cell>
          <table:table-cell office:value-type="float" office:value="0.585519201722633" calcext:value-type="float">
            <text:p>0,585519201722633</text:p>
          </table:table-cell>
          <table:table-cell office:value-type="float" office:value="0.740581151247564" calcext:value-type="float">
            <text:p>0,740581151247564</text:p>
          </table:table-cell>
        </table:table-row>
        <table:table-row table:style-name="ro1">
          <table:table-cell table:formula="of:=[.A12] + 1" office:value-type="float" office:value="1.95" calcext:value-type="float">
            <text:p>1,95</text:p>
          </table:table-cell>
          <table:table-cell table:formula="of:=[.B12]" office:value-type="float" office:value="0.98" calcext:value-type="float">
            <text:p>0,98</text:p>
          </table:table-cell>
          <table:table-cell table:number-columns-repeated="2"/>
          <table:table-cell table:formula="of:=[.$A12] + 1" office:value-type="float" office:value="1.95" calcext:value-type="float">
            <text:p>1,95</text:p>
          </table:table-cell>
          <table:table-cell table:formula="of:=LN([.$E38]) * [.$P$37] + [.$P$36]" office:value-type="float" office:value="0.993542441353144" calcext:value-type="float">
            <text:p>0,993542441353144</text:p>
          </table:table-cell>
          <table:table-cell table:number-columns-repeated="15"/>
        </table:table-row>
        <table:table-row table:style-name="ro1">
          <table:table-cell table:formula="of:=[.A13] + 1" office:value-type="float" office:value="1.97" calcext:value-type="float">
            <text:p>1,97</text:p>
          </table:table-cell>
          <table:table-cell table:formula="of:=[.B13]" office:value-type="float" office:value="0.99" calcext:value-type="float">
            <text:p>0,99</text:p>
          </table:table-cell>
          <table:table-cell table:number-columns-repeated="2"/>
          <table:table-cell table:formula="of:=[.$A13] + 1" office:value-type="float" office:value="1.97" calcext:value-type="float">
            <text:p>1,97</text:p>
          </table:table-cell>
          <table:table-cell table:formula="of:=LN([.$E39]) * [.$P$37] + [.$P$36]" office:value-type="float" office:value="1.00030831818806" calcext:value-type="float">
            <text:p>1,00030831818806</text:p>
          </table:table-cell>
          <table:table-cell table:number-columns-repeated="8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number-columns-repeated="14"/>
          <table:table-cell table:number-matrix-columns-spanned="1" table:number-matrix-rows-spanned="12" table:formula="of:=[.$A$28:.$A$39]" office:value-type="float" office:value="1" calcext:value-type="float">
            <text:p>1</text:p>
          </table:table-cell>
          <table:table-cell table:number-matrix-columns-spanned="1" table:number-matrix-rows-spanned="12" table:formula="of:=MMULT(LN([.$O$40:.$O$51]) ; [.$P$37]) + [.$P$36]" office:value-type="float" office:value="0.550738058004923" calcext:value-type="float">
            <text:p>0,550738058004923</text:p>
          </table:table-cell>
          <table:table-cell table:number-matrix-columns-spanned="1" table:number-matrix-rows-spanned="12" table:formula="of:=[.$B$28:.$B$39]" office:value-type="float" office:value="0.5" calcext:value-type="float">
            <text:p>0,5</text:p>
          </table:table-cell>
          <table:table-cell table:number-matrix-columns-spanned="1" table:number-matrix-rows-spanned="12" table:formula="of:=[.$Q$40:.$Q$51] - [.$P$40:.$P$51]" office:value-type="float" office:value="-0.050738058004923" calcext:value-type="float">
            <text:p>-0,05073805800492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1.1" calcext:value-type="float">
            <text:p>1,1</text:p>
          </table:table-cell>
          <table:table-cell office:value-type="float" office:value="0.613933489545007" calcext:value-type="float">
            <text:p>0,613933489545007</text:p>
          </table:table-cell>
          <table:table-cell office:value-type="float" office:value="0.6" calcext:value-type="float">
            <text:p>0,6</text:p>
          </table:table-cell>
          <table:table-cell office:value-type="float" office:value="-0.0139334895450072" calcext:value-type="float">
            <text:p>-0,0139334895450072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1.2" calcext:value-type="float">
            <text:p>1,2</text:p>
          </table:table-cell>
          <table:table-cell office:value-type="float" office:value="0.671626398414193" calcext:value-type="float">
            <text:p>0,671626398414193</text:p>
          </table:table-cell>
          <table:table-cell office:value-type="float" office:value="0.7" calcext:value-type="float">
            <text:p>0,7</text:p>
          </table:table-cell>
          <table:table-cell office:value-type="float" office:value="0.0283736015858075" calcext:value-type="float">
            <text:p>0,028373601585807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1.3" calcext:value-type="float">
            <text:p>1,3</text:p>
          </table:table-cell>
          <table:table-cell office:value-type="float" office:value="0.724698729863476" calcext:value-type="float">
            <text:p>0,724698729863476</text:p>
          </table:table-cell>
          <table:table-cell office:value-type="float" office:value="0.75" calcext:value-type="float">
            <text:p>0,75</text:p>
          </table:table-cell>
          <table:table-cell office:value-type="float" office:value="0.0253012701365241" calcext:value-type="float">
            <text:p>0,0253012701365241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1.4" calcext:value-type="float">
            <text:p>1,4</text:p>
          </table:table-cell>
          <table:table-cell office:value-type="float" office:value="0.773836033878954" calcext:value-type="float">
            <text:p>0,773836033878954</text:p>
          </table:table-cell>
          <table:table-cell office:value-type="float" office:value="0.8" calcext:value-type="float">
            <text:p>0,8</text:p>
          </table:table-cell>
          <table:table-cell office:value-type="float" office:value="0.026163966121046" calcext:value-type="float">
            <text:p>0,026163966121046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1.5" calcext:value-type="float">
            <text:p>1,5</text:p>
          </table:table-cell>
          <table:table-cell office:value-type="float" office:value="0.819581769494591" calcext:value-type="float">
            <text:p>0,819581769494591</text:p>
          </table:table-cell>
          <table:table-cell office:value-type="float" office:value="0.85" calcext:value-type="float">
            <text:p>0,85</text:p>
          </table:table-cell>
          <table:table-cell office:value-type="float" office:value="0.0304182305054092" calcext:value-type="float">
            <text:p>0,0304182305054092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1.6" calcext:value-type="float">
            <text:p>1,6</text:p>
          </table:table-cell>
          <table:table-cell office:value-type="float" office:value="0.862374047324945" calcext:value-type="float">
            <text:p>0,862374047324945</text:p>
          </table:table-cell>
          <table:table-cell office:value-type="float" office:value="0.88" calcext:value-type="float">
            <text:p>0,88</text:p>
          </table:table-cell>
          <table:table-cell office:value-type="float" office:value="0.0176259526750552" calcext:value-type="float">
            <text:p>0,0176259526750552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1.7" calcext:value-type="float">
            <text:p>1,7</text:p>
          </table:table-cell>
          <table:table-cell office:value-type="float" office:value="0.902571213519674" calcext:value-type="float">
            <text:p>0,902571213519674</text:p>
          </table:table-cell>
          <table:table-cell office:value-type="float" office:value="0.9" calcext:value-type="float">
            <text:p>0,9</text:p>
          </table:table-cell>
          <table:table-cell office:value-type="float" office:value="-0.00257121351967415" calcext:value-type="float">
            <text:p>-0,0025712135196741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1.8" calcext:value-type="float">
            <text:p>1,8</text:p>
          </table:table-cell>
          <table:table-cell office:value-type="float" office:value="0.94047010990386" calcext:value-type="float">
            <text:p>0,94047010990386</text:p>
          </table:table-cell>
          <table:table-cell office:value-type="float" office:value="0.92" calcext:value-type="float">
            <text:p>0,92</text:p>
          </table:table-cell>
          <table:table-cell office:value-type="float" office:value="-0.0204701099038603" calcext:value-type="float">
            <text:p>-0,020470109903860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1.9" calcext:value-type="float">
            <text:p>1,9</text:p>
          </table:table-cell>
          <table:table-cell office:value-type="float" office:value="0.976319390509176" calcext:value-type="float">
            <text:p>0,976319390509176</text:p>
          </table:table-cell>
          <table:table-cell office:value-type="float" office:value="0.96" calcext:value-type="float">
            <text:p>0,96</text:p>
          </table:table-cell>
          <table:table-cell office:value-type="float" office:value="-0.0163193905091756" calcext:value-type="float">
            <text:p>-0,0163193905091756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1.95" calcext:value-type="float">
            <text:p>1,95</text:p>
          </table:table-cell>
          <table:table-cell office:value-type="float" office:value="0.993542441353144" calcext:value-type="float">
            <text:p>0,993542441353144</text:p>
          </table:table-cell>
          <table:table-cell office:value-type="float" office:value="0.98" calcext:value-type="float">
            <text:p>0,98</text:p>
          </table:table-cell>
          <table:table-cell office:value-type="float" office:value="-0.0135424413531439" calcext:value-type="float">
            <text:p>-0,0135424413531439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1.97" calcext:value-type="float">
            <text:p>1,97</text:p>
          </table:table-cell>
          <table:table-cell office:value-type="float" office:value="1.00030831818806" calcext:value-type="float">
            <text:p>1,00030831818806</text:p>
          </table:table-cell>
          <table:table-cell office:value-type="float" office:value="0.99" calcext:value-type="float">
            <text:p>0,99</text:p>
          </table:table-cell>
          <table:table-cell office:value-type="float" office:value="-0.0103083181880588" calcext:value-type="float">
            <text:p>-0,01030831818805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6T23:17:28.539073821</meta:creation-date>
    <dc:date>2026-05-17T01:05:48.835797288</dc:date>
    <meta:editing-duration>PT1H25S</meta:editing-duration>
    <meta:editing-cycles>1</meta:editing-cycles>
    <meta:document-statistic meta:table-count="1" meta:cell-count="192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026cm" svg:y="4.204cm" style:legend-expansion="high" chart:style-name="ch2"/>
        <chart:plot-area chart:style-name="ch3" table:cell-range-address="Sheet1.A1:Sheet1.B13" chart:data-source-has-labels="row" svg:x="0.319cm" svg:y="0.18cm" svg:width="13.388cm" svg:height="8.646cm">
          <chart:coordinate-region svg:x="1.046cm" svg:y="0.38cm" svg:width="12.42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3" chart:label-cell-address="Sheet1.B1:Sheet1.B1" chart:class="chart:scatter">
            <chart:domain table:cell-range-address="Sheet1.A2:Sheet1.A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REE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3</svg:desc>
                </draw:g>
              </table:table-cell>
              <table:table-cell office:value-type="float" office:value="0.5">
                <text:p>0.5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">
                <text:p>0.9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